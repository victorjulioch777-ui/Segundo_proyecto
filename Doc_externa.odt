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2" style:family="paragraph" style:parent-style-name="Heading_20_1">
      <style:paragraph-properties fo:text-indent="0.5in" style:auto-text-indent="false"/>
    </style:style>
    <style:style style:name="P3" style:family="paragraph" style:parent-style-name="Heading_20_1">
      <style:paragraph-properties fo:margin-top="0in" fo:margin-bottom="0.0555in" style:contextual-spacing="false" fo:text-indent="0.5in" style:auto-text-indent="false" fo:break-before="page"/>
    </style:style>
    <style:style style:name="P4" style:family="paragraph" style:parent-style-name="Standard">
      <style:paragraph-properties fo:margin-right="0.1807in" fo:text-align="end" style:justify-single-word="false">
        <style:tab-stops>
          <style:tab-stop style:position="3.1598in" style:type="center"/>
          <style:tab-stop style:position="4.0402in"/>
        </style:tab-stops>
      </style:paragraph-properties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T1" style:family="text">
      <style:text-properties fo:color="#071320" loext:opacity="100%">
        <loext:char-complex-color loext:theme-type="dark2" loext:color-type="theme">
          <loext:transformation loext:type="shade" loext:value="4980"/>
        </loext:char-complex-color>
      </style:text-properties>
    </style:style>
    <style:style style:name="T2" style:family="text">
      <style:text-properties fo:color="#2c7fce" loext:opacity="100%" fo:letter-spacing="0.0417in" fo:language="es" fo:country="ES">
        <loext:char-complex-color loext:theme-type="dark2" loext:color-type="theme">
          <loext:transformation loext:type="tint" loext:value="4000"/>
        </loext:char-complex-color>
      </style:text-properties>
    </style:style>
    <style:style style:name="T3" style:family="text">
      <style:text-properties fo:color="#2c7fce" loext:opacity="100%" fo:language="es" fo:country="ES">
        <loext:char-complex-color loext:theme-type="dark2" loext:color-type="theme">
          <loext:transformation loext:type="tint" loext:value="4000"/>
        </loext:char-complex-color>
      </style:text-properties>
    </style:style>
    <style:style style:name="T4" style:family="text">
      <style:text-properties fo:color="#0a1d30" loext:opacity="100%">
        <loext:char-complex-color loext:theme-type="dark2" loext:color-type="theme">
          <loext:transformation loext:type="shade" loext:value="2509"/>
        </loext:char-complex-color>
      </style:text-properties>
    </style:style>
    <style:style style:name="T5" style:family="text">
      <style:text-properties fo:color="#0a1d30" loext:opacity="100%" fo:language="es" fo:country="ES">
        <loext:char-complex-color loext:theme-type="dark2" loext:color-type="theme">
          <loext:transformation loext:type="shade" loext:value="2509"/>
        </loext:char-complex-color>
      </style:text-properties>
    </style:style>
    <style:style style:name="T6" style:family="text">
      <style:text-properties style:font-name="Times New Roman" fo:font-weight="bold" style:font-weight-asian="bold" style:font-name-complex="Times New Roman1" style:font-weight-complex="bold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fo:language="es" fo:country="MX" style:font-size-asian="12pt" style:font-name-complex="Times New Roman1" style:font-size-complex="12pt"/>
    </style:style>
    <style:style style:name="T9" style:family="text">
      <style:text-properties style:font-name="Times New Roman" fo:font-size="12pt" fo:language="es" fo:country="MX" fo:font-weight="bold" style:font-size-asian="12pt" style:font-weight-asian="bold" style:font-name-complex="Times New Roman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ituto Tecnológico de Costa Rica </text:p>
      <text:p text:style-name="P1">Unidad de Computación </text:p>
      <text:p text:style-name="P1"/>
      <text:p text:style-name="P1">Juego de Laberinto Dinámico con Matrices y Programación Orientada a Objetos en Python</text:p>
      <text:p text:style-name="P1"/>
      <text:p text:style-name="P1">Profesor:</text:p>
      <text:p text:style-name="P1">Leonardo Viquez Acuña</text:p>
      <text:p text:style-name="P1"/>
      <text:p text:style-name="P1"/>
      <text:p text:style-name="P1">Víctor Julio Chavarria Ordoñez</text:p>
      <text:p text:style-name="P1"/>
      <text:p text:style-name="P1"/>
      <text:p text:style-name="P1"/>
      <text:p text:style-name="P1">Sede San Carlos</text:p>
      <text:p text:style-name="P1"/>
      <text:p text:style-name="P1"/>
      <text:p text:style-name="P1">19 de mayo de 2026</text:p>
      <text:h text:style-name="P2" text:outline-level="1" loext:marker-style-name="T7"><text:bookmark-start text:name="_Toc227526564"/><text:soft-page-break/><text:span text:style-name="T7">Introducción:</text:span><text:bookmark-end text:name="_Toc227526564"/><text:span text:style-name="T7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1" loext:marker-style-name="T8"><text:bookmark-start text:name="_Toc227526565"/><text:soft-page-break/><text:span text:style-name="T7">Análisis del problema:</text:span><text:bookmark-end text:name="_Toc227526565"/><text:span text:style-name="T7"> </text:span><text:span text:style-name="T9"/></text:h>
      <text:p text:style-name="Standard"/>
      <text:p text:style-name="Standard"/>
      <text:p text:style-name="Standard"/>
      <text:h text:style-name="P3" text:outline-level="1" loext:marker-style-name="T7"><text:bookmark-start text:name="_Toc227526566"/><text:span text:style-name="T7">Solución del problema:</text:span><text:bookmark-end text:name="_Toc227526566"/><text:span text:style-name="T7"> </text:span><text:span text:style-name="T7"/></text:h>
      <text:p text:style-name="Standard"/>
      <text:h text:style-name="P3" text:outline-level="1" loext:marker-style-name="T9"><text:bookmark-start text:name="_Toc227526567"/><text:span text:style-name="T7">Análisis de resultados:</text:span><text:bookmark-end text:name="_Toc227526567"/><text:span text:style-name="T7"> </text:span><text:span text:style-name="T9"/></text:h>
      <text:p text:style-name="Standard"/>
      <text:h text:style-name="P3" text:outline-level="1" loext:marker-style-name="T7"><text:bookmark-start text:name="_Toc227526570"/><text:span text:style-name="T7">Conclusiones:</text:span><text:bookmark-end text:name="_Toc227526570"/><text:span text:style-name="T7"/></text:h>
      <text:p text:style-name="Standard"/>
      <text:h text:style-name="P3" text:outline-level="1" loext:marker-style-name="T7"><text:bookmark-start text:name="_Toc227526571"/><text:span text:style-name="T7">Recomendaciones:</text:span><text:bookmark-end text:name="_Toc227526571"/><text:span text:style-name="T7"/></text:h>
      <text:p text:style-name="Standard"/>
      <text:h text:style-name="P3" text:outline-level="1" loext:marker-style-name="T8"><text:bookmark-start text:name="_Toc227526572"/><text:span text:style-name="T7">Referencias bibliográficas:</text:span><text:bookmark-end text:name="_Toc227526572"/><text:span text:style-name="T9"/></text:h>
      <text:p text:style-name="Standard"/>
      <text:p text:style-name="P1" loext:marker-style-name="T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s" fo:country="CR" style:letter-kerning="true" style:font-name-asian="Aptos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es" fo:country="CR" style:letter-kerning="true" style:font-name-asian="Aptos1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 UI" style:font-family-complex="'Noto Sans Arabic U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 UI" style:font-family-complex="'Noto Sans Arabic U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Standard">
      <style:paragraph-properties fo:margin-right="0.1807in" fo:text-align="end" style:justify-single-word="false">
        <style:tab-stops>
          <style:tab-stop style:position="3.1598in" style:type="center"/>
          <style:tab-stop style:position="4.0402in"/>
        </style:tab-stops>
      </style:paragraph-properties>
    </style:style>
    <style:style style:name="MT1" style:family="text">
      <style:text-properties fo:color="#071320" loext:opacity="100%">
        <loext:char-complex-color loext:theme-type="dark2" loext:color-type="theme">
          <loext:transformation loext:type="shade" loext:value="4980"/>
        </loext:char-complex-color>
      </style:text-properties>
    </style:style>
    <style:style style:name="MT2" style:family="text">
      <style:text-properties fo:color="#2c7fce" loext:opacity="100%" fo:letter-spacing="0.0417in" fo:language="es" fo:country="ES">
        <loext:char-complex-color loext:theme-type="dark2" loext:color-type="theme">
          <loext:transformation loext:type="tint" loext:value="4000"/>
        </loext:char-complex-color>
      </style:text-properties>
    </style:style>
    <style:style style:name="MT3" style:family="text">
      <style:text-properties fo:color="#2c7fce" loext:opacity="100%" fo:language="es" fo:country="ES">
        <loext:char-complex-color loext:theme-type="dark2" loext:color-type="theme">
          <loext:transformation loext:type="tint" loext:value="4000"/>
        </loext:char-complex-color>
      </style:text-properties>
    </style:style>
    <style:style style:name="MT4" style:family="text">
      <style:text-properties fo:color="#0a1d30" loext:opacity="100%">
        <loext:char-complex-color loext:theme-type="dark2" loext:color-type="theme">
          <loext:transformation loext:type="shade" loext:value="2509"/>
        </loext:char-complex-color>
      </style:text-properties>
    </style:style>
    <style:style style:name="MT5" style:family="text">
      <style:text-properties fo:color="#0a1d30" loext:opacity="100%" fo:language="es" fo:country="ES">
        <loext:char-complex-color loext:theme-type="dark2" loext:color-type="theme">
          <loext:transformation loext:type="shade" loext:value="2509"/>
        </loext:char-complex-color>
      </style:text-properties>
    </style:style>
    <style:page-layout style:name="Mpm1">
      <style:page-layout-properties fo:page-width="8.5in" fo:page-height="11in" style:num-format="1" style:print-orientation="portrait" fo:margin-top="0.9839in" fo:margin-bottom="0.4917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2">Página</text:span><text:span text:style-name="MT3"> </text:span><text:span text:style-name="MT4"><text:page-number text:select-page="current">8</text:page-number></text:span><text:span text:style-name="MT5"><text:s/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CTOR JULIO CHAVARRIA ORDOÑEZ</meta:initial-creator>
    <meta:editing-cycles>7</meta:editing-cycles>
    <meta:creation-date>2026-05-07T01:07:00</meta:creation-date>
    <dc:date>2026-05-08T11:00:18.097359652</dc:date>
    <meta:editing-duration>PT5M25S</meta:editing-duration>
    <meta:generator>LibreOffice/24.2.7.2$Linux_X86_64 LibreOffice_project/420$Build-2</meta:generator>
    <meta:document-statistic meta:table-count="0" meta:image-count="0" meta:object-count="0" meta:page-count="8" meta:paragraph-count="16" meta:word-count="53" meta:character-count="384" meta:non-whitespace-character-count="341"/>
    <meta:user-defined meta:name="AppVersion">16.0000</meta:user-defined>
    <meta:template xlink:type="simple" xlink:actuate="onRequest" xlink:title="Normal.dotm" xlink:href=""/>
  </office:meta>
</office:document-meta>
</file>